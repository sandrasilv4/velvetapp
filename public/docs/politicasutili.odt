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>
        <style:tab-stops>
          <style:tab-stop style:type="left" style:position="1.5937in"/>
        </style:tab-stops>
      </style:paragraph-properties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justify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text-align="justify"/>
    </style:style>
    <style:style style:name="P9" style:parent-style-name="Normal" style:list-style-name="LFO22" style:family="paragraph">
      <style:paragraph-properties fo:text-align="justify"/>
    </style:style>
    <style:style style:name="P10" style:parent-style-name="Normal" style:list-style-name="LFO22" style:family="paragraph">
      <style:paragraph-properties fo:text-align="justify"/>
    </style:style>
    <style:style style:name="P11" style:parent-style-name="Normal" style:list-style-name="LFO22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Tipodeletrapredefinidodoparágrafo" style:family="text">
      <style:text-properties fo:font-weight="bold" style:font-weight-asian="bold" style:font-weight-complex="bold"/>
    </style:style>
    <style:style style:name="T15" style:parent-style-name="Hiperligação" style:family="text">
      <style:text-properties style:use-window-font-color="true" style:text-underline-type="none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23" style:family="paragraph"/>
    <style:style style:name="P20" style:parent-style-name="Normal" style:list-style-name="LFO23" style:family="paragraph"/>
    <style:style style:name="P21" style:parent-style-name="Normal" style:list-style-name="LFO23" style:family="paragraph"/>
    <style:style style:name="P22" style:parent-style-name="Normal" style:list-style-name="LFO23" style:family="paragraph"/>
    <style:style style:name="P23" style:parent-style-name="Normal" style:list-style-name="LFO23" style:family="paragraph"/>
    <style:style style:name="P24" style:parent-style-name="Normal" style:list-style-name="LFO23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24" style:family="paragraph"/>
    <style:style style:name="P27" style:parent-style-name="Normal" style:list-style-name="LFO24" style:family="paragraph"/>
    <style:style style:name="P28" style:parent-style-name="Normal" style:list-style-name="LFO24" style:family="paragraph"/>
    <style:style style:name="P29" style:parent-style-name="Normal" style:list-style-name="LFO24" style:family="paragraph"/>
    <style:style style:name="P30" style:parent-style-name="Normal" style:list-style-name="LFO24" style:family="paragraph"/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25" style:family="paragraph"/>
    <style:style style:name="P33" style:parent-style-name="Normal" style:list-style-name="LFO25" style:family="paragraph"/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26" style:family="paragraph"/>
    <style:style style:name="P36" style:parent-style-name="Normal" style:list-style-name="LFO26" style:family="paragraph"/>
    <style:style style:name="P37" style:parent-style-name="Normal" style:list-style-name="LFO26" style:family="paragraph"/>
    <style:style style:name="P38" style:parent-style-name="Normal" style:list-style-name="LFO26" style:family="paragraph"/>
    <style:style style:name="P39" style:parent-style-name="Normal" style:list-style-name="LFO26" style:family="paragraph"/>
    <style:style style:name="P40" style:parent-style-name="Normal" style:list-style-name="LFO26" style:family="paragraph"/>
    <style:style style:name="P41" style:parent-style-name="Normal" style:list-style-name="LFO26" style:family="paragraph"/>
    <style:style style:name="P42" style:parent-style-name="Normal" style:list-style-name="LFO26" style:family="paragraph"/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27" style:family="paragraph"/>
    <style:style style:name="P45" style:parent-style-name="Normal" style:list-style-name="LFO27" style:family="paragraph"/>
    <style:style style:name="P46" style:parent-style-name="Normal" style:list-style-name="LFO27" style:family="paragraph"/>
    <style:style style:name="P47" style:parent-style-name="Normal" style:list-style-name="LFO27" style:family="paragraph"/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28" style:family="paragraph"/>
    <style:style style:name="P50" style:parent-style-name="Normal" style:list-style-name="LFO28" style:family="paragraph"/>
    <style:style style:name="P51" style:parent-style-name="Normal" style:list-style-name="LFO28" style:family="paragraph"/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29" style:family="paragraph"/>
    <style:style style:name="P54" style:parent-style-name="Normal" style:list-style-name="LFO29" style:family="paragraph"/>
    <style:style style:name="P55" style:parent-style-name="Normal" style:list-style-name="LFO29" style:family="paragraph"/>
    <style:style style:name="P56" style:parent-style-name="Normal" style:list-style-name="LFO29" style:family="paragraph"/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30" style:family="paragraph"/>
    <style:style style:name="P59" style:parent-style-name="Normal" style:list-style-name="LFO30" style:family="paragraph"/>
    <style:style style:name="P60" style:parent-style-name="Normal" style:list-style-name="LFO30" style:family="paragraph"/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31" style:family="paragraph"/>
    <style:style style:name="P63" style:parent-style-name="Normal" style:list-style-name="LFO31" style:family="paragraph"/>
    <style:style style:name="P64" style:parent-style-name="Normal" style:list-style-name="LFO31" style:family="paragraph"/>
    <style:style style:name="P65" style:parent-style-name="Normal" style:list-style-name="LFO31" style:family="paragraph"/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32" style:family="paragraph"/>
    <style:style style:name="P68" style:parent-style-name="Normal" style:list-style-name="LFO32" style:family="paragraph"/>
    <style:style style:name="P69" style:parent-style-name="Normal" style:list-style-name="LFO32" style:family="paragraph"/>
    <style:style style:name="P70" style:parent-style-name="Normal" style:list-style-name="LFO32" style:family="paragraph"/>
    <style:style style:name="P71" style:parent-style-name="Normal" style:list-style-name="LFO32" style:family="paragraph"/>
    <style:style style:name="P72" style:parent-style-name="Normal" style:list-style-name="LFO32" style:family="paragraph"/>
    <style:style style:name="P73" style:parent-style-name="Normal" style:list-style-name="LFO32" style:family="paragraph"/>
    <style:style style:name="P74" style:parent-style-name="Normal" style:list-style-name="LFO32" style:family="paragraph"/>
    <style:style style:name="T75" style:parent-style-name="Hiperligação" style:family="text">
      <style:text-properties style:use-window-font-color="true" style:text-underline-type="none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list-style-name="LFO33" style:family="paragraph"/>
    <style:style style:name="P78" style:parent-style-name="Normal" style:list-style-name="LFO33" style:family="paragraph"/>
    <style:style style:name="P79" style:parent-style-name="Normal" style:list-style-name="LFO33" style:family="paragraph"/>
    <style:style style:name="P80" style:parent-style-name="Normal" style:list-style-name="LFO33" style:family="paragraph"/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list-style-name="LFO34" style:family="paragraph"/>
    <style:style style:name="P83" style:parent-style-name="Normal" style:list-style-name="LFO34" style:family="paragraph"/>
    <style:style style:name="P84" style:parent-style-name="Normal" style:list-style-name="LFO34" style:family="paragraph"/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35" style:family="paragraph"/>
    <style:style style:name="P88" style:parent-style-name="Normal" style:list-style-name="LFO35" style:family="paragraph"/>
    <style:style style:name="P89" style:parent-style-name="Normal" style:list-style-name="LFO35" style:family="paragraph"/>
    <style:style style:name="P90" style:parent-style-name="Normal" style:list-style-name="LFO35" style:family="paragraph"/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36" style:family="paragraph"/>
    <style:style style:name="P93" style:parent-style-name="Normal" style:list-style-name="LFO36" style:family="paragraph"/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list-style-name="LFO37" style:family="paragraph"/>
    <style:style style:name="P96" style:parent-style-name="Normal" style:list-style-name="LFO37" style:family="paragraph"/>
    <style:style style:name="P97" style:parent-style-name="Normal" style:list-style-name="LFO37" style:family="paragraph"/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list-style-name="LFO38" style:family="paragraph"/>
    <style:style style:name="P101" style:parent-style-name="Normal" style:list-style-name="LFO38" style:family="paragraph"/>
    <style:style style:name="P102" style:parent-style-name="Normal" style:list-style-name="LFO38" style:family="paragraph"/>
    <style:style style:name="P103" style:parent-style-name="Normal" style:list-style-name="LFO38" style:family="paragraph"/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Última atualização: 06/04/2026</text:p>
      <text:p text:style-name="P5">1. INTRODUÇÃO</text:p>
      <text:p text:style-name="P6">A presente Política de Privacidade descreve como a<text:s/><text:span text:style-name="T7">Velvet Entertainment</text:span><text:s/>coleta, utiliza, armazena, compartilha e protege os dados pessoais dos usuários da Plataforma.</text:p>
      <text:p text:style-name="P8">Esta Política está em conformidade com:</text:p>
      <text:list text:style-name="LFO22" text:continue-numbering="true">
        <text:list-item>
          <text:p text:style-name="P9">Lei Geral de Proteção de Dados (LGPD – Lei nº 13.709/2018)</text:p>
        </text:list-item>
        <text:list-item>
          <text:p text:style-name="P10">Regulamento Geral de Proteção de Dados da União Europeia (GDPR – EU 2016/679)</text:p>
        </text:list-item>
        <text:list-item>
          <text:p text:style-name="P11">Normas aplicáveis sobre cookies e comunicações eletrônicas</text:p>
        </text:list-item>
      </text:list>
      <text:p text:style-name="P12">Ao utilizar a Plataforma, o usuário declara que leu, compreendeu e concorda com esta Política.</text:p>
      <text:p text:style-name="Normal"><draw:custom-shape svg:x="0in" svg:y="0in" svg:width="45.51042in" svg:height="0.00139in" draw:z-index="0" draw:id="id0" draw:style-name="a1" draw:name="Horizontal Line 371" text:anchor-type="as-char"><svg:title/><svg:desc/><draw:enhanced-geometry draw:type="non-primitive" svg:viewBox="0 0 21600 21600" draw:enhanced-path="M 0 0 L 21600 0 21600 21600 0 21600 Z N"/></draw:custom-shape></text:p>
      <text:p text:style-name="P13">2. IDENTIFICAÇÃO DO CONTROLADOR</text:p>
      <text:p text:style-name="SemEspaçamento"><text:span text:style-name="T14">Velvet Entertainment</text:span><text:line-break/>Responsável: Sandra Samanta da Silva<text:line-break/>CNPJ: 64.320.030/0001-68<text:line-break/>Local: São Paulo – SP</text:p>
      <text:p text:style-name="SemEspaçamento">Contato:<text:s/><text:a xlink:href="mailto:contato@velvet.lat" office:target-frame-name="_top" xlink:show="replace"><text:span text:style-name="T15">contato@velvet.lat</text:span></text:a><text:line-break/></text:p>
      <text:p text:style-name="Normal">O Encarregado de Proteção de Dados (DPO) pode ser contatado pelos canais acima.</text:p>
      <text:p text:style-name="Normal"><draw:custom-shape svg:x="0in" svg:y="0in" svg:width="45.51042in" svg:height="0.00139in" draw:z-index="0" draw:id="id1" draw:style-name="a2" draw:name="Horizontal Line 372" text:anchor-type="as-char"><svg:title/><svg:desc/><draw:enhanced-geometry draw:type="non-primitive" svg:viewBox="0 0 21600 21600" draw:enhanced-path="M 0 0 L 21600 0 21600 21600 0 21600 Z N"/></draw:custom-shape></text:p>
      <text:p text:style-name="P16">3. QUEM PODE UTILIZAR A PLATAFORMA</text:p>
      <text:p text:style-name="Normal">A Velvet é destinada exclusivamente a maiores de 18 anos.</text:p>
      <text:p text:style-name="Normal">Caso seja identificado cadastro de menor, a conta será removida e os dados excluídos, conforme a legislação aplicável.</text:p>
      <text:p text:style-name="Normal"><draw:custom-shape svg:x="0in" svg:y="0in" svg:width="45.51042in" svg:height="0.00139in" draw:z-index="0" draw:id="id2" draw:style-name="a3" draw:name="Horizontal Line 373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P17">4. DADOS COLETADOS</text:p>
      <text:p text:style-name="P18">4.1 Dados fornecidos pelo usuário</text:p>
      <text:soft-page-break/>
      <text:list text:style-name="LFO23" text:continue-numbering="true">
        <text:list-item>
          <text:p text:style-name="P19">Nome ou nome artístico</text:p>
        </text:list-item>
        <text:list-item>
          <text:p text:style-name="P20">E-mail</text:p>
        </text:list-item>
        <text:list-item>
          <text:p text:style-name="P21">Data de nascimento</text:p>
        </text:list-item>
        <text:list-item>
          <text:p text:style-name="P22">Dados de pagamento</text:p>
        </text:list-item>
        <text:list-item>
          <text:p text:style-name="P23">Documentos de verificação (KYC)</text:p>
        </text:list-item>
        <text:list-item>
          <text:p text:style-name="P24">Conteúdos, mensagens e interações</text:p>
        </text:list-item>
      </text:list>
      <text:p text:style-name="P25">4.2 Dados coletados automaticamente</text:p>
      <text:list text:style-name="LFO24" text:continue-numbering="true">
        <text:list-item>
          <text:p text:style-name="P26">Endereço IP</text:p>
        </text:list-item>
        <text:list-item>
          <text:p text:style-name="P27">Localização aproximada</text:p>
        </text:list-item>
        <text:list-item>
          <text:p text:style-name="P28">Tipo de dispositivo, navegador e sistema operacional</text:p>
        </text:list-item>
        <text:list-item>
          <text:p text:style-name="P29">Logs de acesso e uso</text:p>
        </text:list-item>
        <text:list-item>
          <text:p text:style-name="P30">Cookies e identificadores técnicos</text:p>
        </text:list-item>
      </text:list>
      <text:p text:style-name="P31">4.3 Dados de terceiros</text:p>
      <text:list text:style-name="LFO25" text:continue-numbering="true">
        <text:list-item>
          <text:p text:style-name="P32">Provedores de pagamento</text:p>
        </text:list-item>
        <text:list-item>
          <text:p text:style-name="P33">Serviços antifraude e verificação de identidade</text:p>
        </text:list-item>
      </text:list>
      <text:p text:style-name="Normal"><draw:custom-shape svg:x="0in" svg:y="0in" svg:width="45.51042in" svg:height="0.00139in" draw:z-index="0" draw:id="id3" draw:style-name="a4" draw:name="Horizontal Line 374" text:anchor-type="as-char"><svg:title/><svg:desc/><draw:enhanced-geometry draw:type="non-primitive" svg:viewBox="0 0 21600 21600" draw:enhanced-path="M 0 0 L 21600 0 21600 21600 0 21600 Z N"/></draw:custom-shape></text:p>
      <text:p text:style-name="P34">5. FINALIDADE DO TRATAMENTO</text:p>
      <text:p text:style-name="Normal">Os dados são utilizados para:</text:p>
      <text:list text:style-name="LFO26" text:continue-numbering="true">
        <text:list-item>
          <text:p text:style-name="P35">Criação e gestão de contas</text:p>
        </text:list-item>
        <text:list-item>
          <text:p text:style-name="P36">Verificação de identidade e idade</text:p>
        </text:list-item>
        <text:list-item>
          <text:p text:style-name="P37">Processamento de pagamentos e assinaturas</text:p>
        </text:list-item>
        <text:list-item>
          <text:p text:style-name="P38">Funcionamento da plataforma (chat, conteúdo, interações)</text:p>
        </text:list-item>
        <text:list-item>
          <text:p text:style-name="P39">Prevenção de fraudes, abusos e atividades ilegais</text:p>
        </text:list-item>
        <text:list-item>
          <text:p text:style-name="P40">Cumprimento de obrigações legais</text:p>
        </text:list-item>
        <text:list-item>
          <text:p text:style-name="P41">Comunicação com usuários</text:p>
        </text:list-item>
        <text:list-item>
          <text:p text:style-name="P42">Personalização e melhoria da experiência</text:p>
        </text:list-item>
      </text:list>
      <text:p text:style-name="Normal"><draw:custom-shape svg:x="0in" svg:y="0in" svg:width="45.51042in" svg:height="0.00139in" draw:z-index="0" draw:id="id4" draw:style-name="a5" draw:name="Horizontal Line 37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43">6. BASES LEGAIS</text:p>
      <text:p text:style-name="Normal">O tratamento é realizado com base em:</text:p>
      <text:list text:style-name="LFO27" text:continue-numbering="true">
        <text:list-item>
          <text:p text:style-name="P44">Execução de contrato</text:p>
        </text:list-item>
        <text:list-item>
          <text:p text:style-name="P45">Consentimento</text:p>
        </text:list-item>
        <text:list-item>
          <text:p text:style-name="P46">Cumprimento de obrigação legal</text:p>
        </text:list-item>
        <text:list-item>
          <text:p text:style-name="P47">Legítimo interesse</text:p>
        </text:list-item>
      </text:list>
      <text:p text:style-name="Normal">Quando aplicável, a Velvet realiza avaliação de balanceamento para garantir que seus interesses não prejudiquem os direitos dos usuários.</text:p>
      <text:p text:style-name="Normal"><draw:custom-shape svg:x="0in" svg:y="0in" svg:width="45.51042in" svg:height="0.00139in" draw:z-index="0" draw:id="id5" draw:style-name="a6" draw:name="Horizontal Line 376" text:anchor-type="as-char"><svg:title/><svg:desc/><draw:enhanced-geometry draw:type="non-primitive" svg:viewBox="0 0 21600 21600" draw:enhanced-path="M 0 0 L 21600 0 21600 21600 0 21600 Z N"/></draw:custom-shape></text:p>
      <text:p text:style-name="P48">7. DECISÕES AUTOMATIZADAS E ANÁLISE DE PERFIL</text:p>
      <text:p text:style-name="Normal">A Plataforma pode utilizar sistemas automatizados para:</text:p>
      <text:list text:style-name="LFO28" text:continue-numbering="true">
        <text:list-item>
          <text:p text:style-name="P49">Detecção de fraude</text:p>
        </text:list-item>
        <text:list-item>
          <text:p text:style-name="P50">Análise de comportamento</text:p>
        </text:list-item>
        <text:list-item>
          <text:p text:style-name="P51">Segurança da conta</text:p>
        </text:list-item>
      </text:list>
      <text:p text:style-name="Normal">O usuário poderá solicitar revisão humana dessas decisões e obter informações sobre os critérios utilizados.</text:p>
      <text:p text:style-name="Normal"><draw:custom-shape svg:x="0in" svg:y="0in" svg:width="45.51042in" svg:height="0.00139in" draw:z-index="0" draw:id="id6" draw:style-name="a7" draw:name="Horizontal Line 377" text:anchor-type="as-char"><svg:title/><svg:desc/><draw:enhanced-geometry draw:type="non-primitive" svg:viewBox="0 0 21600 21600" draw:enhanced-path="M 0 0 L 21600 0 21600 21600 0 21600 Z N"/></draw:custom-shape></text:p>
      <text:p text:style-name="P52">8. COMPARTILHAMENTO DE DADOS</text:p>
      <text:p text:style-name="Normal">Os dados poderão ser compartilhados com:</text:p>
      <text:list text:style-name="LFO29" text:continue-numbering="true">
        <text:list-item>
          <text:p text:style-name="P53">Processadores de pagamento</text:p>
        </text:list-item>
        <text:list-item>
          <text:p text:style-name="P54">Prestadores de serviços tecnológicos (cloud, segurança)</text:p>
        </text:list-item>
        <text:list-item>
          <text:p text:style-name="P55">Serviços antifraude e compliance</text:p>
        </text:list-item>
        <text:list-item>
          <text:p text:style-name="P56">Autoridades públicas, quando exigido por lei</text:p>
        </text:list-item>
      </text:list>
      <text:p text:style-name="Normal">A Velvet não comercializa dados pessoais.</text:p>
      <text:p text:style-name="Normal"><draw:custom-shape svg:x="0in" svg:y="0in" svg:width="45.51042in" svg:height="0.00139in" draw:z-index="0" draw:id="id7" draw:style-name="a8" draw:name="Horizontal Line 378" text:anchor-type="as-char"><svg:title/><svg:desc/><draw:enhanced-geometry draw:type="non-primitive" svg:viewBox="0 0 21600 21600" draw:enhanced-path="M 0 0 L 21600 0 21600 21600 0 21600 Z N"/></draw:custom-shape></text:p>
      <text:p text:style-name="P57">9. TRANSFERÊNCIA INTERNACIONAL DE DADOS</text:p>
      <text:p text:style-name="Normal">Os dados podem ser armazenados ou processados fora do Brasil ou da União Europeia.</text:p>
      <text:soft-page-break/>
      <text:p text:style-name="Normal">Nesses casos, a Velvet adota medidas como:</text:p>
      <text:list text:style-name="LFO30" text:continue-numbering="true">
        <text:list-item>
          <text:p text:style-name="P58">Cláusulas contratuais padrão (SCCs)</text:p>
        </text:list-item>
        <text:list-item>
          <text:p text:style-name="P59">Avaliações de impacto (TIA)</text:p>
        </text:list-item>
        <text:list-item>
          <text:p text:style-name="P60">Medidas de segurança adicionais</text:p>
        </text:list-item>
      </text:list>
      <text:p text:style-name="Normal"><draw:custom-shape svg:x="0in" svg:y="0in" svg:width="45.51042in" svg:height="0.00139in" draw:z-index="0" draw:id="id8" draw:style-name="a9" draw:name="Horizontal Line 379" text:anchor-type="as-char"><svg:title/><svg:desc/><draw:enhanced-geometry draw:type="non-primitive" svg:viewBox="0 0 21600 21600" draw:enhanced-path="M 0 0 L 21600 0 21600 21600 0 21600 Z N"/></draw:custom-shape></text:p>
      <text:p text:style-name="P61">10. RETENÇÃO DOS DADOS</text:p>
      <text:p text:style-name="Normal">Os dados serão armazenados pelo tempo necessário para:</text:p>
      <text:list text:style-name="LFO31" text:continue-numbering="true">
        <text:list-item>
          <text:p text:style-name="P62">Execução do contrato</text:p>
        </text:list-item>
        <text:list-item>
          <text:p text:style-name="P63">Cumprimento de obrigações legais</text:p>
        </text:list-item>
        <text:list-item>
          <text:p text:style-name="P64">Prevenção de fraudes</text:p>
        </text:list-item>
        <text:list-item>
          <text:p text:style-name="P65">Exercício de direitos em processos judiciais</text:p>
        </text:list-item>
      </text:list>
      <text:p text:style-name="Normal"><draw:custom-shape svg:x="0in" svg:y="0in" svg:width="45.51042in" svg:height="0.00139in" draw:z-index="0" draw:id="id9" draw:style-name="a10" draw:name="Horizontal Line 380" text:anchor-type="as-char"><svg:title/><svg:desc/><draw:enhanced-geometry draw:type="non-primitive" svg:viewBox="0 0 21600 21600" draw:enhanced-path="M 0 0 L 21600 0 21600 21600 0 21600 Z N"/></draw:custom-shape></text:p>
      <text:p text:style-name="P66">11. DIREITOS DOS TITULARES</text:p>
      <text:p text:style-name="Normal">O usuário poderá, a qualquer momento:</text:p>
      <text:list text:style-name="LFO32" text:continue-numbering="true">
        <text:list-item>
          <text:p text:style-name="P67">Confirmar a existência de tratamento</text:p>
        </text:list-item>
        <text:list-item>
          <text:p text:style-name="P68">Acessar seus dados</text:p>
        </text:list-item>
        <text:list-item>
          <text:p text:style-name="P69">Corrigir dados incompletos ou incorretos</text:p>
        </text:list-item>
        <text:list-item>
          <text:p text:style-name="P70">Solicitar exclusão de dados</text:p>
        </text:list-item>
        <text:list-item>
          <text:p text:style-name="P71">Revogar consentimento</text:p>
        </text:list-item>
        <text:list-item>
          <text:p text:style-name="P72">Solicitar portabilidade</text:p>
        </text:list-item>
        <text:list-item>
          <text:p text:style-name="P73">Opor-se ao tratamento</text:p>
        </text:list-item>
        <text:list-item>
          <text:p text:style-name="P74">Solicitar revisão de decisões automatizadas</text:p>
        </text:list-item>
      </text:list>
      <text:p text:style-name="Normal">Solicitações:<text:s/><text:a xlink:href="mailto:contato@velvet.com" office:target-frame-name="_top" xlink:show="replace"><text:span text:style-name="T75">contato@velvet.com</text:span></text:a></text:p>
      <text:p text:style-name="Normal"><draw:custom-shape svg:x="0in" svg:y="0in" svg:width="45.51042in" svg:height="0.00139in" draw:z-index="0" draw:id="id10" draw:style-name="a11" draw:name="Horizontal Line 381" text:anchor-type="as-char"><svg:title/><svg:desc/><draw:enhanced-geometry draw:type="non-primitive" svg:viewBox="0 0 21600 21600" draw:enhanced-path="M 0 0 L 21600 0 21600 21600 0 21600 Z N"/></draw:custom-shape></text:p>
      <text:p text:style-name="P76">12. SEGURANÇA DA INFORMAÇÃO</text:p>
      <text:p text:style-name="Normal">A Velvet adota medidas técnicas e organizacionais como:</text:p>
      <text:list text:style-name="LFO33" text:continue-numbering="true">
        <text:list-item>
          <text:p text:style-name="P77">Criptografia</text:p>
        </text:list-item>
        <text:list-item>
          <text:p text:style-name="P78">Controle de acesso</text:p>
        </text:list-item>
        <text:list-item>
          <text:p text:style-name="P79">Monitoramento contínuo</text:p>
        </text:list-item>
        <text:list-item>
          <text:p text:style-name="P80">Sistemas antifraude</text:p>
        </text:list-item>
      </text:list>
      <text:p text:style-name="Normal">Apesar disso, nenhum sistema é totalmente seguro.</text:p>
      <text:p text:style-name="Normal"><draw:custom-shape svg:x="0in" svg:y="0in" svg:width="45.51042in" svg:height="0.00139in" draw:z-index="0" draw:id="id11" draw:style-name="a12" draw:name="Horizontal Line 382" text:anchor-type="as-char"><svg:title/><svg:desc/><draw:enhanced-geometry draw:type="non-primitive" svg:viewBox="0 0 21600 21600" draw:enhanced-path="M 0 0 L 21600 0 21600 21600 0 21600 Z N"/></draw:custom-shape></text:p>
      <text:p text:style-name="P81">13. INCIDENTES DE SEGURANÇA</text:p>
      <text:p text:style-name="Normal">Em caso de violação de dados pessoais:</text:p>
      <text:list text:style-name="LFO34" text:continue-numbering="true">
        <text:list-item>
          <text:p text:style-name="P82">Autoridades competentes poderão ser notificadas em até 72 horas, quando aplicável</text:p>
        </text:list-item>
        <text:list-item>
          <text:p text:style-name="P83">Usuários serão informados quando houver risco relevante</text:p>
        </text:list-item>
        <text:list-item>
          <text:p text:style-name="P84">Medidas corretivas serão adotadas imediatamente</text:p>
        </text:list-item>
      </text:list>
      <text:p text:style-name="Normal"><draw:custom-shape svg:x="0in" svg:y="0in" svg:width="45.51042in" svg:height="0.00139in" draw:z-index="0" draw:id="id12" draw:style-name="a13" draw:name="Horizontal Line 383" text:anchor-type="as-char"><svg:title/><svg:desc/><draw:enhanced-geometry draw:type="non-primitive" svg:viewBox="0 0 21600 21600" draw:enhanced-path="M 0 0 L 21600 0 21600 21600 0 21600 Z N"/></draw:custom-shape></text:p>
      <text:p text:style-name="P85">14. COOKIES E TECNOLOGIAS SEMELHANTES</text:p>
      <text:p text:style-name="P86">Tipos de cookies:</text:p>
      <text:list text:style-name="LFO35" text:continue-numbering="true">
        <text:list-item>
          <text:p text:style-name="P87">Essenciais (necessários para funcionamento)</text:p>
        </text:list-item>
        <text:list-item>
          <text:p text:style-name="P88">Desempenho (análise de uso)</text:p>
        </text:list-item>
        <text:list-item>
          <text:p text:style-name="P89">Funcionais (preferências)</text:p>
        </text:list-item>
        <text:list-item>
          <text:p text:style-name="P90">Marketing (personalização)</text:p>
        </text:list-item>
      </text:list>
      <text:p text:style-name="P91">Consentimento:</text:p>
      <text:p text:style-name="Normal">O uso de cookies não essenciais depende de consentimento prévio, obtido por meio de banner de preferências.</text:p>
      <text:p text:style-name="Normal">O usuário pode:</text:p>
      <text:list text:style-name="LFO36" text:continue-numbering="true">
        <text:list-item>
          <text:p text:style-name="P92">Aceitar ou recusar categorias de cookies</text:p>
        </text:list-item>
        <text:list-item>
          <text:p text:style-name="P93">Alterar preferências a qualquer momento</text:p>
        </text:list-item>
      </text:list>
      <text:p text:style-name="Normal"><draw:custom-shape svg:x="0in" svg:y="0in" svg:width="45.51042in" svg:height="0.00139in" draw:z-index="0" draw:id="id13" draw:style-name="a14" draw:name="Horizontal Line 384" text:anchor-type="as-char"><svg:title/><svg:desc/><draw:enhanced-geometry draw:type="non-primitive" svg:viewBox="0 0 21600 21600" draw:enhanced-path="M 0 0 L 21600 0 21600 21600 0 21600 Z N"/></draw:custom-shape></text:p>
      <text:p text:style-name="P94">15. VERIFICAÇÃO DE IDENTIDADE (KYC)</text:p>
      <text:p text:style-name="Normal">Para segurança e cumprimento legal, a Velvet poderá solicitar:</text:p>
      <text:soft-page-break/>
      <text:list text:style-name="LFO37" text:continue-numbering="true">
        <text:list-item>
          <text:p text:style-name="P95">Documentos de identificação</text:p>
        </text:list-item>
        <text:list-item>
          <text:p text:style-name="P96">Verificação de idade</text:p>
        </text:list-item>
        <text:list-item>
          <text:p text:style-name="P97">Validação de dados financeiros</text:p>
        </text:list-item>
      </text:list>
      <text:p text:style-name="Normal"><draw:custom-shape svg:x="0in" svg:y="0in" svg:width="45.51042in" svg:height="0.00139in" draw:z-index="0" draw:id="id14" draw:style-name="a15" draw:name="Horizontal Line 385" text:anchor-type="as-char"><svg:title/><svg:desc/><draw:enhanced-geometry draw:type="non-primitive" svg:viewBox="0 0 21600 21600" draw:enhanced-path="M 0 0 L 21600 0 21600 21600 0 21600 Z N"/></draw:custom-shape></text:p>
      <text:p text:style-name="P98">16. CONTEÚDO ADULTO E RESPONSABILIDADE</text:p>
      <text:p text:style-name="Normal">A Plataforma pode conter conteúdo adulto.</text:p>
      <text:p text:style-name="Normal">A Velvet atua como intermediadora e não se responsabiliza por conteúdos gerados por usuários.</text:p>
      <text:p text:style-name="Normal">Recomenda-se o uso consciente e práticas seguras de navegação.</text:p>
      <text:p text:style-name="Normal"><draw:custom-shape svg:x="0in" svg:y="0in" svg:width="45.51042in" svg:height="0.00139in" draw:z-index="0" draw:id="id15" draw:style-name="a16" draw:name="Horizontal Line 386" text:anchor-type="as-char"><svg:title/><svg:desc/><draw:enhanced-geometry draw:type="non-primitive" svg:viewBox="0 0 21600 21600" draw:enhanced-path="M 0 0 L 21600 0 21600 21600 0 21600 Z N"/></draw:custom-shape></text:p>
      <text:p text:style-name="P99">17. GOVERNANÇA E PROTEÇÃO DE DADOS</text:p>
      <text:p text:style-name="Normal">A Velvet adota práticas de governança, incluindo:</text:p>
      <text:list text:style-name="LFO38" text:continue-numbering="true">
        <text:list-item>
          <text:p text:style-name="P100">Registro de operações de tratamento</text:p>
        </text:list-item>
        <text:list-item>
          <text:p text:style-name="P101">Avaliações de impacto quando aplicável</text:p>
        </text:list-item>
        <text:list-item>
          <text:p text:style-name="P102">Políticas internas de segurança</text:p>
        </text:list-item>
        <text:list-item>
          <text:p text:style-name="P103">Treinamento de equipe</text:p>
        </text:list-item>
      </text:list>
      <text:p text:style-name="Normal"><draw:custom-shape svg:x="0in" svg:y="0in" svg:width="45.51042in" svg:height="0.00139in" draw:z-index="0" draw:id="id16" draw:style-name="a17" draw:name="Horizontal Line 387" text:anchor-type="as-char"><svg:title/><svg:desc/><draw:enhanced-geometry draw:type="non-primitive" svg:viewBox="0 0 21600 21600" draw:enhanced-path="M 0 0 L 21600 0 21600 21600 0 21600 Z N"/></draw:custom-shape></text:p>
      <text:p text:style-name="P104">18. ALTERAÇÕES</text:p>
      <text:p text:style-name="Normal">Esta Política poderá ser atualizada a qualquer momento.</text:p>
      <text:p text:style-name="Normal">O uso contínuo da Plataforma implica aceitação das alterações.</text:p>
      <text:p text:style-name="Normal"><draw:custom-shape svg:x="0in" svg:y="0in" svg:width="45.51042in" svg:height="0.00139in" draw:z-index="0" draw:id="id17" draw:style-name="a18" draw:name="Horizontal Line 388" text:anchor-type="as-char"><svg:title/><svg:desc/><draw:enhanced-geometry draw:type="non-primitive" svg:viewBox="0 0 21600 21600" draw:enhanced-path="M 0 0 L 21600 0 21600 21600 0 21600 Z N"/></draw:custom-shape></text:p>
      <text:p text:style-name="P105">19. CONTATO</text:p>
      <text:p text:style-name="Normal">Para dúvidas ou solicitações:<text:s/><text:a xlink:href="mailto:contato@velvet.lat" office:target-frame-name="_top" xlink:show="replace"><text:span text:style-name="Hiperligação">contato@velvet.lat</text:span></text:a><text:line-break/></text:p>
      <text:p text:style-name="Normal"><draw:custom-shape svg:x="0in" svg:y="0in" svg:width="45.51042in" svg:height="0.00139in" draw:z-index="0" draw:id="id18" draw:style-name="a19" draw:name="Horizontal Line 389" text:anchor-type="as-char"><svg:title/><svg:desc/><draw:enhanced-geometry draw:type="non-primitive" svg:viewBox="0 0 21600 21600" draw:enhanced-path="M 0 0 L 21600 0 21600 21600 0 21600 Z N"/></draw:custom-shape></text:p>
      <text:p text:style-name="P106">20. DISPOSIÇÕES FINAIS</text:p>
      <text:p text:style-name="Normal">Esta Política deve ser interpretada em conjunto com os Termos de Uso e conforme a legislação aplicáve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SemEspaçamento" style:display-name="Sem Espaçament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Título1" style:family="paragraph">
      <style:paragraph-properties fo:text-align="center"/>
    </style:style>
    <style:style style:name="T3" style:parent-style-name="Tipodeletrapredefinidodoparágrafo" style:family="text">
      <style:text-properties fo:color="#6F3CFF"/>
    </style:style>
    <style:style style:name="T4" style:parent-style-name="Tipodeletrapredefinidodoparágrafo" style:family="text">
      <style:text-properties fo:color="#6F3CFF"/>
    </style:style>
    <style:style style:family="graphic" style:name="a0" style:parent-style-name="Graphics">
      <style:graphic-properties fo:border="0.01042in none" fo:background-color="transparent" style:wrap="parallel" style:wrap-contour="false" fo:clip="rect(1.84381in, 0in, 1.86742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1"><text:span text:style-name="T3"><draw:frame draw:z-index="251659264" draw:style-name="a0" draw:name="Imagem 1" text:anchor-type="paragraph" svg:x="-0.95069in" svg:y="0.00833in" svg:width="2.23958in" svg:height="0.64466in" style:rel-width="scale" style:rel-height="scale"><draw:image xlink:href="media/image1.png" xlink:type="simple" xlink:show="embed" xlink:actuate="onLoad"/><svg:title/><svg:desc/></draw:frame></text:span><text:span text:style-name="T4">POLÍTICA DE PRIVACIDADE</text:span></text:h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ra silva</meta:initial-creator>
    <dc:creator>Sandra silva</dc:creator>
    <meta:creation-date>2026-04-06T19:10:00Z</meta:creation-date>
    <dc:date>2026-04-06T20:21:00Z</dc:date>
    <meta:print-date>2026-04-06T19:26:00Z</meta:print-date>
    <meta:template xlink:href="Normal" xlink:type="simple"/>
    <meta:editing-cycles>1</meta:editing-cycles>
    <meta:editing-duration>PT1920S</meta:editing-duration>
    <meta:document-statistic meta:page-count="6" meta:paragraph-count="10" meta:word-count="847" meta:character-count="5415" meta:row-count="38" meta:non-whitespace-character-count="4578"/>
  </office:meta>
</office:document-meta>
</file>