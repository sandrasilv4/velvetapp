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end"/>
    </style:style>
    <style:style style:name="T5" style:parent-style-name="Tipodeletrapredefinidodoparágrafo" style:family="text">
      <style:text-properties fo:font-weight="bold" style:font-weight-asian="bold" style:font-weight-complex="bold"/>
    </style:style>
    <style:style style:name="P6" style:parent-style-name="Normal" style:family="paragraph">
      <style:paragraph-properties fo:text-align="end"/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P17" style:parent-style-name="Normal" style:list-style-name="LFO2" style:family="paragraph"/>
    <style:style style:name="P18" style:parent-style-name="Normal" style:list-style-name="LFO2" style:family="paragraph"/>
    <style:style style:name="P19" style:parent-style-name="Normal" style:list-style-name="LFO2" style:family="paragraph"/>
    <style:style style:name="P20" style:parent-style-name="Normal" style:family="paragraph">
      <style:text-properties fo:font-weight="bold" style:font-weight-asian="bold" style:font-weight-complex="bold"/>
    </style:style>
    <style:style style:name="T21" style:parent-style-name="Tipodeletrapredefinidodoparágrafo" style:family="text">
      <style:text-properties fo:font-weight="bold" style:font-weight-asian="bold" style:font-weight-complex="bold"/>
    </style:style>
    <style:style style:name="T22" style:parent-style-name="Tipodeletrapredefinidodoparágrafo" style:family="text">
      <style:text-properties fo:font-weight="bold" style:font-weight-asian="bold" style:font-weight-complex="bold"/>
    </style:style>
    <style:style style:name="P23" style:parent-style-name="Normal" style:list-style-name="LFO3" style:family="paragraph"/>
    <style:style style:name="P24" style:parent-style-name="Normal" style:list-style-name="LFO3" style:family="paragraph"/>
    <style:style style:name="P25" style:parent-style-name="Normal" style:list-style-name="LFO3" style:family="paragraph"/>
    <style:style style:name="P26" style:parent-style-name="Normal" style:list-style-name="LFO3" style:family="paragraph"/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list-style-name="LFO4" style:family="paragraph"/>
    <style:style style:name="P29" style:parent-style-name="Normal" style:list-style-name="LFO4" style:family="paragraph"/>
    <style:style style:name="P30" style:parent-style-name="Normal" style:list-style-name="LFO4" style:family="paragraph"/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list-style-name="LFO5" style:family="paragraph"/>
    <style:style style:name="P34" style:parent-style-name="Normal" style:list-style-name="LFO5" style:family="paragraph"/>
    <style:style style:name="P35" style:parent-style-name="Normal" style:list-style-name="LFO5" style:family="paragraph"/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list-style-name="LFO6" style:family="paragraph"/>
    <style:style style:name="P39" style:parent-style-name="Normal" style:list-style-name="LFO6" style:family="paragraph"/>
    <style:style style:name="P40" style:parent-style-name="Normal" style:list-style-name="LFO6" style:family="paragraph"/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list-style-name="LFO7" style:family="paragraph"/>
    <style:style style:name="P44" style:parent-style-name="Normal" style:list-style-name="LFO7" style:family="paragraph"/>
    <style:style style:name="P45" style:parent-style-name="Normal" style:list-style-name="LFO7" style:family="paragraph"/>
    <style:style style:name="P46" style:parent-style-name="Normal" style:list-style-name="LFO7" style:family="paragraph"/>
    <style:style style:name="T47" style:parent-style-name="Tipodeletrapredefinidodoparágrafo" style:family="text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list-style-name="LFO8" style:family="paragraph"/>
    <style:style style:name="P50" style:parent-style-name="Normal" style:list-style-name="LFO8" style:family="paragraph"/>
    <style:style style:name="P51" style:parent-style-name="Normal" style:list-style-name="LFO8" style:family="paragraph"/>
    <style:style style:name="P52" style:parent-style-name="Normal" style:list-style-name="LFO8" style:family="paragraph"/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list-style-name="LFO9" style:family="paragraph"/>
    <style:style style:name="P55" style:parent-style-name="Normal" style:list-style-name="LFO9" style:family="paragraph"/>
    <style:style style:name="P56" style:parent-style-name="Normal" style:list-style-name="LFO9" style:family="paragraph"/>
    <style:style style:name="P57" style:parent-style-name="Normal" style:list-style-name="LFO9" style:family="paragraph"/>
    <style:style style:name="P58" style:parent-style-name="Normal" style:list-style-name="LFO9" style:family="paragraph"/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list-style-name="LFO10" style:family="paragraph"/>
    <style:style style:name="P61" style:parent-style-name="Normal" style:list-style-name="LFO10" style:family="paragraph"/>
    <style:style style:name="P62" style:parent-style-name="Normal" style:list-style-name="LFO10" style:family="paragraph"/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list-style-name="LFO11" style:family="paragraph"/>
    <style:style style:name="P65" style:parent-style-name="Normal" style:list-style-name="LFO11" style:family="paragraph"/>
    <style:style style:name="P66" style:parent-style-name="Normal" style:list-style-name="LFO11" style:family="paragraph"/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list-style-name="LFO12" style:family="paragraph"/>
    <style:style style:name="T69" style:parent-style-name="Tipodeletrapredefinidodoparágrafo" style:family="text">
      <style:text-properties fo:font-weight="bold" style:font-weight-asian="bold" style:font-weight-complex="bold"/>
    </style:style>
    <style:style style:name="P70" style:parent-style-name="Normal" style:list-style-name="LFO12" style:family="paragraph"/>
    <style:style style:name="P71" style:parent-style-name="Normal" style:list-style-name="LFO12" style:family="paragraph"/>
    <style:style style:name="P72" style:parent-style-name="Normal" style:list-style-name="LFO12" style:family="paragraph"/>
    <style:style style:name="P73" style:parent-style-name="Normal" style:list-style-name="LFO12" style:family="paragraph"/>
    <style:style style:name="P74" style:parent-style-name="Normal" style:list-style-name="LFO12" style:family="paragraph"/>
    <style:style style:name="P75" style:parent-style-name="Normal" style:list-style-name="LFO12" style:family="paragraph"/>
    <style:style style:name="P76" style:parent-style-name="Normal" style:list-style-name="LFO12" style:family="paragraph"/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list-style-name="LFO13" style:family="paragraph"/>
    <style:style style:name="P79" style:parent-style-name="Normal" style:list-style-name="LFO13" style:family="paragraph"/>
    <style:style style:name="P80" style:parent-style-name="Normal" style:list-style-name="LFO13" style:family="paragraph"/>
    <style:style style:name="P81" style:parent-style-name="Normal" style:list-style-name="LFO13" style:family="paragraph"/>
    <style:style style:name="P82" style:parent-style-name="Normal" style:list-style-name="LFO13" style:family="paragraph"/>
    <style:style style:name="P83" style:parent-style-name="Normal" style:list-style-name="LFO13" style:family="paragraph"/>
    <style:style style:name="P84" style:parent-style-name="Normal" style:list-style-name="LFO13" style:family="paragraph"/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list-style-name="LFO14" style:family="paragraph"/>
    <style:style style:name="P88" style:parent-style-name="Normal" style:list-style-name="LFO14" style:family="paragraph"/>
    <style:style style:name="P89" style:parent-style-name="Normal" style:list-style-name="LFO14" style:family="paragraph"/>
    <style:style style:name="P90" style:parent-style-name="Normal" style:list-style-name="LFO14" style:family="paragraph"/>
    <style:style style:name="P91" style:parent-style-name="Normal" style:list-style-name="LFO14" style:family="paragraph"/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list-style-name="LFO15" style:family="paragraph"/>
    <style:style style:name="P94" style:parent-style-name="Normal" style:list-style-name="LFO15" style:family="paragraph"/>
    <style:style style:name="P95" style:parent-style-name="Normal" style:list-style-name="LFO15" style:family="paragraph"/>
    <style:style style:name="P96" style:parent-style-name="Normal" style:list-style-name="LFO15" style:family="paragraph"/>
    <style:style style:name="P97" style:parent-style-name="Normal" style:list-style-name="LFO15" style:family="paragraph"/>
    <style:style style:name="P98" style:parent-style-name="Normal" style:list-style-name="LFO15" style:family="paragraph"/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P102" style:parent-style-name="Normal" style:list-style-name="LFO16" style:family="paragraph"/>
    <style:style style:name="P103" style:parent-style-name="Normal" style:list-style-name="LFO16" style:family="paragraph"/>
    <style:style style:name="P104" style:parent-style-name="Normal" style:list-style-name="LFO16" style:family="paragraph"/>
    <style:style style:name="P105" style:parent-style-name="Normal" style:list-style-name="LFO16" style:family="paragraph"/>
    <style:style style:name="P106" style:parent-style-name="Normal" style:list-style-name="LFO17" style:family="paragraph"/>
    <style:style style:name="P107" style:parent-style-name="Normal" style:list-style-name="LFO17" style:family="paragraph"/>
    <style:style style:name="P108" style:parent-style-name="Normal" style:list-style-name="LFO17" style:family="paragraph"/>
    <style:style style:name="P109" style:parent-style-name="Normal" style:family="paragraph">
      <style:text-properties fo:font-weight="bold" style:font-weight-asian="bold" style:font-weight-complex="bold"/>
    </style:style>
    <style:style style:name="P110" style:parent-style-name="Normal" style:list-style-name="LFO18" style:family="paragraph"/>
    <style:style style:name="P111" style:parent-style-name="Normal" style:list-style-name="LFO18" style:family="paragraph"/>
    <style:style style:name="P112" style:parent-style-name="Normal" style:list-style-name="LFO18" style:family="paragraph"/>
    <style:style style:name="P113" style:parent-style-name="Normal" style:family="paragraph">
      <style:text-properties fo:font-weight="bold" style:font-weight-asian="bold" style:font-weight-complex="bold"/>
    </style:style>
    <style:style style:name="P114" style:parent-style-name="Normal" style:list-style-name="LFO19" style:family="paragraph"/>
    <style:style style:name="P115" style:parent-style-name="Normal" style:list-style-name="LFO19" style:family="paragraph"/>
    <style:style style:name="P116" style:parent-style-name="Normal" style:list-style-name="LFO19" style:family="paragraph"/>
    <style:style style:name="P117" style:parent-style-name="Normal" style:list-style-name="LFO19" style:family="paragraph"/>
    <style:style style:name="P118" style:parent-style-name="Normal" style:family="paragraph">
      <style:text-properties fo:font-weight="bold" style:font-weight-asian="bold" style:font-weight-complex="bold"/>
    </style:style>
    <style:style style:name="P119" style:parent-style-name="Normal" style:list-style-name="LFO20" style:family="paragraph"/>
    <style:style style:name="P120" style:parent-style-name="Normal" style:list-style-name="LFO20" style:family="paragraph"/>
    <style:style style:name="P121" style:parent-style-name="Normal" style:list-style-name="LFO20" style:family="paragraph"/>
    <style:style style:name="P122" style:parent-style-name="Normal" style:family="paragraph">
      <style:text-properties fo:font-weight="bold" style:font-weight-asian="bold" style:font-weight-complex="bold"/>
    </style:style>
    <style:style style:name="T123" style:parent-style-name="Hiperligação" style:family="text">
      <style:text-properties style:use-window-font-color="true" style:text-underline-type="none"/>
    </style:style>
    <style:style style:name="P124" style:parent-style-name="Normal" style:family="paragraph">
      <style:text-properties fo:font-weight="bold" style:font-weight-asian="bold" style:font-weight-complex="bold"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line-break/><text:span text:style-name="T5">Última atualização: 06/04/2026</text:span></text:p>
      <text:p text:style-name="P6"/>
      <text:p text:style-name="Normal">Este documento reúne as políticas que regulam o uso da plataforma Velvet, sendo parte integrante dos Termos de Uso.</text:p>
      <text:p text:style-name="Normal">Ao acessar ou utilizar a Plataforma, o usuário declara que leu, compreendeu e concorda integralmente com estas Políticas.</text:p>
      <text:p text:style-name="Normal"><draw:custom-shape svg:x="0in" svg:y="0in" svg:width="45.51042in" svg:height="0.00139in" draw:z-index="0" draw:id="id0" draw:style-name="a1" draw:name="Horizontal Line 145" text:anchor-type="as-char"><svg:title/><svg:desc/><draw:enhanced-geometry draw:type="non-primitive" svg:viewBox="0 0 21600 21600" draw:enhanced-path="M 0 0 L 21600 0 21600 21600 0 21600 Z N"/></draw:custom-shape></text:p>
      <text:p text:style-name="P7">ÍNDICE</text:p>
      <text:list text:style-name="LFO1" text:continue-numbering="true">
        <text:list-item>
          <text:p text:style-name="P8">Política de Verificação de Idade e Identidade (KYC)</text:p>
        </text:list-item>
        <text:list-item>
          <text:p text:style-name="P9">Política de Pagamentos, Assinaturas, Diamantes e Reembolsos</text:p>
        </text:list-item>
        <text:list-item>
          <text:p text:style-name="P10">Política de Conteúdo</text:p>
        </text:list-item>
        <text:list-item>
          <text:p text:style-name="P11">Política de Conduta e Uso da Plataforma</text:p>
        </text:list-item>
        <text:list-item>
          <text:p text:style-name="P12">Política de Propriedade Intelectual</text:p>
        </text:list-item>
        <text:list-item>
          <text:p text:style-name="P13">Política de Moderação e Sanções</text:p>
        </text:list-item>
      </text:list>
      <text:p text:style-name="Normal"><draw:custom-shape svg:x="0in" svg:y="0in" svg:width="45.51042in" svg:height="0.00139in" draw:z-index="0" draw:id="id1" draw:style-name="a2" draw:name="Horizontal Line 146" text:anchor-type="as-char"><svg:title/><svg:desc/><draw:enhanced-geometry draw:type="non-primitive" svg:viewBox="0 0 21600 21600" draw:enhanced-path="M 0 0 L 21600 0 21600 21600 0 21600 Z N"/></draw:custom-shape></text:p>
      <text:p text:style-name="P14">1. POLÍTICA DE VERIFICAÇÃO DE IDADE E IDENTIDADE (KYC)</text:p>
      <text:p text:style-name="P15">1.1 Objetivo</text:p>
      <text:p text:style-name="Normal">A Velvet realiza verificação de identidade para:</text:p>
      <text:list text:style-name="LFO2" text:continue-numbering="true">
        <text:list-item>
          <text:p text:style-name="P16">Garantir acesso exclusivo a maiores de 18 anos</text:p>
        </text:list-item>
        <text:list-item>
          <text:p text:style-name="P17">Cumprir obrigações legais</text:p>
        </text:list-item>
        <text:list-item>
          <text:p text:style-name="P18">Prevenir fraude e uso indevido</text:p>
        </text:list-item>
        <text:list-item>
          <text:p text:style-name="P19">Proteger usuários e criadoras</text:p>
        </text:list-item>
      </text:list>
      <text:p text:style-name="Normal"><draw:custom-shape svg:x="0in" svg:y="0in" svg:width="45.51042in" svg:height="0.00139in" draw:z-index="0" draw:id="id2" draw:style-name="a3" draw:name="Horizontal Line 147" text:anchor-type="as-char"><svg:title/><svg:desc/><draw:enhanced-geometry draw:type="non-primitive" svg:viewBox="0 0 21600 21600" draw:enhanced-path="M 0 0 L 21600 0 21600 21600 0 21600 Z N"/></draw:custom-shape></text:p>
      <text:p text:style-name="P20">1.2 Obrigatoriedade</text:p>
      <text:p text:style-name="Normal"><text:span text:style-name="T21">Criadoras (Modelos):</text:span><text:line-break/>Verificação obrigatória antes da publicação de qualquer conteúdo.</text:p>
      <text:soft-page-break/>
      <text:p text:style-name="Normal"><text:span text:style-name="T22">Usuários (Assinantes):</text:span><text:line-break/>A Velvet poderá exigir verificação a qualquer momento, especialmente em casos de:</text:p>
      <text:list text:style-name="LFO3" text:continue-numbering="true">
        <text:list-item>
          <text:p text:style-name="P23">Suspeita de fraude</text:p>
        </text:list-item>
        <text:list-item>
          <text:p text:style-name="P24">Chargeback</text:p>
        </text:list-item>
        <text:list-item>
          <text:p text:style-name="P25">Atividade irregular</text:p>
        </text:list-item>
        <text:list-item>
          <text:p text:style-name="P26">Exigência legal</text:p>
        </text:list-item>
      </text:list>
      <text:p text:style-name="Normal"><draw:custom-shape svg:x="0in" svg:y="0in" svg:width="45.51042in" svg:height="0.00139in" draw:z-index="0" draw:id="id3" draw:style-name="a4" draw:name="Horizontal Line 148" text:anchor-type="as-char"><svg:title/><svg:desc/><draw:enhanced-geometry draw:type="non-primitive" svg:viewBox="0 0 21600 21600" draw:enhanced-path="M 0 0 L 21600 0 21600 21600 0 21600 Z N"/></draw:custom-shape></text:p>
      <text:p text:style-name="P27">1.3 Documentos Aceitos</text:p>
      <text:list text:style-name="LFO4" text:continue-numbering="true">
        <text:list-item>
          <text:p text:style-name="P28">Documento oficial com foto (RG, CNH ou Passaporte)</text:p>
        </text:list-item>
        <text:list-item>
          <text:p text:style-name="P29">Selfie ou vídeo com o documento</text:p>
        </text:list-item>
        <text:list-item>
          <text:p text:style-name="P30">Informações adicionais, quando necessário</text:p>
        </text:list-item>
      </text:list>
      <text:p text:style-name="Normal"><draw:custom-shape svg:x="0in" svg:y="0in" svg:width="45.51042in" svg:height="0.00139in" draw:z-index="0" draw:id="id4" draw:style-name="a5" draw:name="Horizontal Line 149" text:anchor-type="as-char"><svg:title/><svg:desc/><draw:enhanced-geometry draw:type="non-primitive" svg:viewBox="0 0 21600 21600" draw:enhanced-path="M 0 0 L 21600 0 21600 21600 0 21600 Z N"/></draw:custom-shape></text:p>
      <text:p text:style-name="P31">1.4 Segurança</text:p>
      <text:p text:style-name="Normal">Os dados serão tratados conforme a Política de Privacidade, com acesso restrito e medidas de proteção adequadas.</text:p>
      <text:p text:style-name="Normal"><draw:custom-shape svg:x="0in" svg:y="0in" svg:width="45.51042in" svg:height="0.00139in" draw:z-index="0" draw:id="id5" draw:style-name="a6" draw:name="Horizontal Line 150" text:anchor-type="as-char"><svg:title/><svg:desc/><draw:enhanced-geometry draw:type="non-primitive" svg:viewBox="0 0 21600 21600" draw:enhanced-path="M 0 0 L 21600 0 21600 21600 0 21600 Z N"/></draw:custom-shape></text:p>
      <text:p text:style-name="P32">1.5 Penalidades</text:p>
      <text:p text:style-name="Normal">O descumprimento poderá resultar em:</text:p>
      <text:list text:style-name="LFO5" text:continue-numbering="true">
        <text:list-item>
          <text:p text:style-name="P33">Suspensão ou encerramento da conta</text:p>
        </text:list-item>
        <text:list-item>
          <text:p text:style-name="P34">Remoção de conteúdo</text:p>
        </text:list-item>
        <text:list-item>
          <text:p text:style-name="P35">Comunicação às autoridades</text:p>
        </text:list-item>
      </text:list>
      <text:p text:style-name="Normal"><draw:custom-shape svg:x="0in" svg:y="0in" svg:width="45.51042in" svg:height="0.00139in" draw:z-index="0" draw:id="id6" draw:style-name="a7" draw:name="Horizontal Line 151" text:anchor-type="as-char"><svg:title/><svg:desc/><draw:enhanced-geometry draw:type="non-primitive" svg:viewBox="0 0 21600 21600" draw:enhanced-path="M 0 0 L 21600 0 21600 21600 0 21600 Z N"/></draw:custom-shape></text:p>
      <text:p text:style-name="P36">2. POLÍTICA DE PAGAMENTOS, ASSINATURAS, DIAMANTES E REEMBOLSOS</text:p>
      <text:p text:style-name="P37">2.1 Disposições Gerais</text:p>
      <text:list text:style-name="LFO6" text:continue-numbering="true">
        <text:list-item>
          <text:p text:style-name="P38">Pagamentos são processados por terceiros</text:p>
        </text:list-item>
        <text:list-item>
          <text:p text:style-name="P39">A Velvet não armazena dados completos de cartão</text:p>
        </text:list-item>
        <text:list-item>
          <text:p text:style-name="P40">O usuário é responsável pelas informações fornecidas</text:p>
        </text:list-item>
      </text:list>
      <text:soft-page-break/>
      <text:p text:style-name="Normal"><draw:custom-shape svg:x="0in" svg:y="0in" svg:width="45.51042in" svg:height="0.00139in" draw:z-index="0" draw:id="id7" draw:style-name="a8" draw:name="Horizontal Line 152" text:anchor-type="as-char"><svg:title/><svg:desc/><draw:enhanced-geometry draw:type="non-primitive" svg:viewBox="0 0 21600 21600" draw:enhanced-path="M 0 0 L 21600 0 21600 21600 0 21600 Z N"/></draw:custom-shape></text:p>
      <text:p text:style-name="P41"/>
      <text:p text:style-name="P42">2.2 Assinaturas</text:p>
      <text:list text:style-name="LFO7" text:continue-numbering="true">
        <text:list-item>
          <text:p text:style-name="P43">Concedem acesso ao perfil da criadora, incluindo conteúdo do feed e interação via chat, conforme definido pela criadora</text:p>
        </text:list-item>
        <text:list-item>
          <text:p text:style-name="P44">O conteúdo do feed é de responsabilidade exclusiva da criadora, podendo variar conforme seu nicho, estilo e proposta, podendo incluir conteúdo adulto ou não, exclusivo ou não exclusivo</text:p>
        </text:list-item>
        <text:list-item>
          <text:p text:style-name="P45">A Velvet não garante frequência, tipo ou padrão de conteúdo</text:p>
        </text:list-item>
        <text:list-item>
          <text:p text:style-name="P46">As assinaturas<text:s/><text:span text:style-name="T47">não incluem conteúdos pagos adicionais</text:span>, salvo quando expressamente indicado</text:p>
        </text:list-item>
      </text:list>
      <text:p text:style-name="Normal"><draw:custom-shape svg:x="0in" svg:y="0in" svg:width="45.51042in" svg:height="0.00139in" draw:z-index="0" draw:id="id8" draw:style-name="a9" draw:name="Horizontal Line 153" text:anchor-type="as-char"><svg:title/><svg:desc/><draw:enhanced-geometry draw:type="non-primitive" svg:viewBox="0 0 21600 21600" draw:enhanced-path="M 0 0 L 21600 0 21600 21600 0 21600 Z N"/></draw:custom-shape></text:p>
      <text:p text:style-name="P48">2.3 Diamantes (Moeda Virtual)</text:p>
      <text:list text:style-name="LFO8" text:continue-numbering="true">
        <text:list-item>
          <text:p text:style-name="P49">Uso exclusivo dentro da Plataforma</text:p>
        </text:list-item>
        <text:list-item>
          <text:p text:style-name="P50">Não possuem valor monetário fora da Velvet</text:p>
        </text:list-item>
        <text:list-item>
          <text:p text:style-name="P51">Não são transferíveis nem resgatáveis</text:p>
        </text:list-item>
        <text:list-item>
          <text:p text:style-name="P52">Não são reembolsáveis, salvo obrigação legal</text:p>
        </text:list-item>
      </text:list>
      <text:p text:style-name="Normal"><draw:custom-shape svg:x="0in" svg:y="0in" svg:width="45.51042in" svg:height="0.00139in" draw:z-index="0" draw:id="id9" draw:style-name="a10" draw:name="Horizontal Line 154" text:anchor-type="as-char"><svg:title/><svg:desc/><draw:enhanced-geometry draw:type="non-primitive" svg:viewBox="0 0 21600 21600" draw:enhanced-path="M 0 0 L 21600 0 21600 21600 0 21600 Z N"/></draw:custom-shape></text:p>
      <text:p text:style-name="P53">2.4 Conteúdos Pagos (Premium ou Pay-Per-View no Chat)</text:p>
      <text:list text:style-name="LFO9" text:continue-numbering="true">
        <text:list-item>
          <text:p text:style-name="P54">Conteúdos pagos são liberados mediante pagamento adicional</text:p>
        </text:list-item>
        <text:list-item>
          <text:p text:style-name="P55">Após o desbloqueio, o conteúdo é considerado entregue e consumido</text:p>
        </text:list-item>
        <text:list-item>
          <text:p text:style-name="P56">Não há reembolso por insatisfação subjetiva</text:p>
        </text:list-item>
        <text:list-item>
          <text:p text:style-name="P57">O conteúdo é de responsabilidade exclusiva da criadora, podendo variar conforme seu nicho e proposta, podendo incluir conteúdo adulto ou não, exclusivo ou não exclusivo</text:p>
        </text:list-item>
        <text:list-item>
          <text:p text:style-name="P58">A Velvet não garante expectativa ou resultado em relação ao conteúdo adquirido</text:p>
        </text:list-item>
      </text:list>
      <text:p text:style-name="Normal"><draw:custom-shape svg:x="0in" svg:y="0in" svg:width="45.51042in" svg:height="0.00139in" draw:z-index="0" draw:id="id10" draw:style-name="a11" draw:name="Horizontal Line 155" text:anchor-type="as-char"><svg:title/><svg:desc/><draw:enhanced-geometry draw:type="non-primitive" svg:viewBox="0 0 21600 21600" draw:enhanced-path="M 0 0 L 21600 0 21600 21600 0 21600 Z N"/></draw:custom-shape></text:p>
      <text:p text:style-name="P59">2.5 Chargebacks</text:p>
      <text:soft-page-break/>
      <text:list text:style-name="LFO10" text:continue-numbering="true">
        <text:list-item>
          <text:p text:style-name="P60">Chargebacks indevidos poderão resultar em suspensão ou encerramento da conta</text:p>
        </text:list-item>
        <text:list-item>
          <text:p text:style-name="P61">A Velvet poderá apresentar evidências às operadoras</text:p>
        </text:list-item>
        <text:list-item>
          <text:p text:style-name="P62">O usuário poderá ser responsabilizado por fraude</text:p>
        </text:list-item>
      </text:list>
      <text:p text:style-name="Normal"><draw:custom-shape svg:x="0in" svg:y="0in" svg:width="45.51042in" svg:height="0.00139in" draw:z-index="0" draw:id="id11" draw:style-name="a12" draw:name="Horizontal Line 156" text:anchor-type="as-char"><svg:title/><svg:desc/><draw:enhanced-geometry draw:type="non-primitive" svg:viewBox="0 0 21600 21600" draw:enhanced-path="M 0 0 L 21600 0 21600 21600 0 21600 Z N"/></draw:custom-shape></text:p>
      <text:p text:style-name="P63">2.6 Prevenção à Fraude</text:p>
      <text:p text:style-name="Normal">A Plataforma utiliza sistemas automatizados para:</text:p>
      <text:list text:style-name="LFO11" text:continue-numbering="true">
        <text:list-item>
          <text:p text:style-name="P64">Detectar atividades suspeitas</text:p>
        </text:list-item>
        <text:list-item>
          <text:p text:style-name="P65">Reduzir riscos financeiros</text:p>
        </text:list-item>
        <text:list-item>
          <text:p text:style-name="P66">Proteger transações</text:p>
        </text:list-item>
      </text:list>
      <text:p text:style-name="Normal"><draw:custom-shape svg:x="0in" svg:y="0in" svg:width="45.51042in" svg:height="0.00139in" draw:z-index="0" draw:id="id12" draw:style-name="a13" draw:name="Horizontal Line 157" text:anchor-type="as-char"><svg:title/><svg:desc/><draw:enhanced-geometry draw:type="non-primitive" svg:viewBox="0 0 21600 21600" draw:enhanced-path="M 0 0 L 21600 0 21600 21600 0 21600 Z N"/></draw:custom-shape></text:p>
      <text:p text:style-name="P67">2.7 Política de Reembolso</text:p>
      <text:list text:style-name="LFO12" text:continue-numbering="true">
        <text:list-item>
          <text:p text:style-name="P68">Assinaturas, Diamantes e conteúdos pagos<text:s/><text:span text:style-name="T69">não são reembolsáveis</text:span>, exceto quando exigido por lei ou nos casos previstos abaixo</text:p>
        </text:list-item>
        <text:list-item>
          <text:p text:style-name="P70">O usuário é informado previamente sobre as condições da compra e deve concordar com os Termos antes de concluir a transação</text:p>
        </text:list-item>
        <text:list-item>
          <text:p text:style-name="P71">O reembolso poderá ocorrer exclusivamente em casos de:</text:p>
          <text:list text:continue-numbering="true">
            <text:list-item>
              <text:p text:style-name="P72">Cobrança em duplicidade</text:p>
            </text:list-item>
            <text:list-item>
              <text:p text:style-name="P73">Erro técnico comprovado</text:p>
            </text:list-item>
            <text:list-item>
              <text:p text:style-name="P74">Falha no sistema</text:p>
            </text:list-item>
            <text:list-item>
              <text:p text:style-name="P75">Não disponibilização do serviço após pagamento</text:p>
            </text:list-item>
          </text:list>
        </text:list-item>
        <text:list-item>
          <text:p text:style-name="P76">A Velvet poderá solicitar comprovação para análise</text:p>
        </text:list-item>
      </text:list>
      <text:p text:style-name="Normal"><draw:custom-shape svg:x="0in" svg:y="0in" svg:width="45.51042in" svg:height="0.00139in" draw:z-index="0" draw:id="id13" draw:style-name="a14" draw:name="Horizontal Line 158" text:anchor-type="as-char"><svg:title/><svg:desc/><draw:enhanced-geometry draw:type="non-primitive" svg:viewBox="0 0 21600 21600" draw:enhanced-path="M 0 0 L 21600 0 21600 21600 0 21600 Z N"/></draw:custom-shape></text:p>
      <text:p text:style-name="P77">2.8 Direito de Arrependimento</text:p>
      <text:list text:style-name="LFO13" text:continue-numbering="true">
        <text:list-item>
          <text:p text:style-name="P78">O usuário reconhece que os serviços e conteúdos digitais da Plataforma são disponibilizados de forma imediata após a confirmação do pagamento</text:p>
        </text:list-item>
        <text:list-item>
          <text:p text:style-name="P79">Ao concluir a compra, o usuário declara ciência e concordância com a execução imediata do serviço</text:p>
        </text:list-item>
        <text:list-item>
          <text:p text:style-name="P80">Dessa forma, o usuário concorda que o direito de arrependimento previsto no artigo 49 do Código de Defesa do Consumidor poderá não ser aplicável</text:p>
        </text:list-item>
        <text:list-item>
          <text:p text:style-name="P81">O usuário será previamente informado sobre:</text:p>
          <text:list text:continue-numbering="true">
            <text:list-item>
              <text:p text:style-name="P82">liberação imediata do conteúdo</text:p>
            </text:list-item>
            <text:list-item>
              <text:p text:style-name="P83">natureza digital do serviço</text:p>
            </text:list-item>
            <text:list-item>
              <text:p text:style-name="P84">possível perda do direito de arrependimento</text:p>
            </text:list-item>
          </text:list>
        </text:list-item>
      </text:list>
      <text:p text:style-name="Normal"><draw:custom-shape svg:x="0in" svg:y="0in" svg:width="38.00694in" svg:height="0.00139in" draw:z-index="0" draw:id="id14" draw:style-name="a15" draw:name="Horizontal Line 159" text:anchor-type="as-char"><svg:title/><svg:desc/><draw:enhanced-geometry draw:type="non-primitive" svg:viewBox="0 0 21600 21600" draw:enhanced-path="M 0 0 L 21600 0 21600 21600 0 21600 Z N"/></draw:custom-shape></text:p>
      <text:p text:style-name="P85"><text:s/>3. POLÍTICA DE CONTEÚDO</text:p>
      <text:p text:style-name="P86">3.1 Conteúdo Permitido</text:p>
      <text:p text:style-name="Normal">A Velvet é uma plataforma social que permite a publicação de:</text:p>
      <text:list text:style-name="LFO14" text:continue-numbering="true">
        <text:list-item>
          <text:p text:style-name="P87">Conteúdo adulto consensual entre maiores de 18 anos</text:p>
        </text:list-item>
        <text:list-item>
          <text:p text:style-name="P88">Nudez e erotismo</text:p>
        </text:list-item>
        <text:list-item>
          <text:p text:style-name="P89">Conteúdos não adultos (lifestyle, entretenimento, educação, etc.)</text:p>
        </text:list-item>
        <text:list-item>
          <text:p text:style-name="P90">Conteúdos personalizados</text:p>
        </text:list-item>
        <text:list-item>
          <text:p text:style-name="P91">Conteúdos em diversos formatos (foto, vídeo, áudio, chat)</text:p>
        </text:list-item>
      </text:list>
      <text:p text:style-name="Normal"><draw:custom-shape svg:x="0in" svg:y="0in" svg:width="45.51042in" svg:height="0.00139in" draw:z-index="0" draw:id="id15" draw:style-name="a16" draw:name="Horizontal Line 160" text:anchor-type="as-char"><svg:title/><svg:desc/><draw:enhanced-geometry draw:type="non-primitive" svg:viewBox="0 0 21600 21600" draw:enhanced-path="M 0 0 L 21600 0 21600 21600 0 21600 Z N"/></draw:custom-shape></text:p>
      <text:p text:style-name="P92">3.2 Conteúdo Proibido</text:p>
      <text:p text:style-name="Normal">É proibido:</text:p>
      <text:list text:style-name="LFO15" text:continue-numbering="true">
        <text:list-item>
          <text:p text:style-name="P93">Conteúdo envolvendo menores</text:p>
        </text:list-item>
        <text:list-item>
          <text:p text:style-name="P94">Conteúdo com aparência infantil</text:p>
        </text:list-item>
        <text:list-item>
          <text:p text:style-name="P95">Violência não consensual</text:p>
        </text:list-item>
        <text:list-item>
          <text:p text:style-name="P96">Exploração sexual ou crimes</text:p>
        </text:list-item>
        <text:list-item>
          <text:p text:style-name="P97">Discurso de ódio</text:p>
        </text:list-item>
        <text:list-item>
          <text:p text:style-name="P98">Violação de direitos autorais ou de imagem</text:p>
        </text:list-item>
      </text:list>
      <text:p text:style-name="Normal"><draw:custom-shape svg:x="0in" svg:y="0in" svg:width="45.51042in" svg:height="0.00139in" draw:z-index="0" draw:id="id16" draw:style-name="a17" draw:name="Horizontal Line 161" text:anchor-type="as-char"><svg:title/><svg:desc/><draw:enhanced-geometry draw:type="non-primitive" svg:viewBox="0 0 21600 21600" draw:enhanced-path="M 0 0 L 21600 0 21600 21600 0 21600 Z N"/></draw:custom-shape></text:p>
      <text:p text:style-name="P99">3.3 Consentimento</text:p>
      <text:p text:style-name="Normal">Todos os participantes devem ter consentimento expresso.</text:p>
      <text:soft-page-break/>
      <text:p text:style-name="Normal">A Velvet poderá exigir comprovação a qualquer momento.</text:p>
      <text:p text:style-name="Normal"><draw:custom-shape svg:x="0in" svg:y="0in" svg:width="45.51042in" svg:height="0.00139in" draw:z-index="0" draw:id="id17" draw:style-name="a18" draw:name="Horizontal Line 162" text:anchor-type="as-char"><svg:title/><svg:desc/><draw:enhanced-geometry draw:type="non-primitive" svg:viewBox="0 0 21600 21600" draw:enhanced-path="M 0 0 L 21600 0 21600 21600 0 21600 Z N"/></draw:custom-shape></text:p>
      <text:p text:style-name="P100">3.4 Responsabilidade</text:p>
      <text:p text:style-name="Normal">O conteúdo é de responsabilidade exclusiva do usuário que o publicou.</text:p>
      <text:p text:style-name="Normal"><draw:custom-shape svg:x="0in" svg:y="0in" svg:width="45.51042in" svg:height="0.00139in" draw:z-index="0" draw:id="id18" draw:style-name="a19" draw:name="Horizontal Line 163" text:anchor-type="as-char"><svg:title/><svg:desc/><draw:enhanced-geometry draw:type="non-primitive" svg:viewBox="0 0 21600 21600" draw:enhanced-path="M 0 0 L 21600 0 21600 21600 0 21600 Z N"/></draw:custom-shape></text:p>
      <text:p text:style-name="P101">4. POLÍTICA DE CONDUTA E USO</text:p>
      <text:p text:style-name="Normal">O usuário compromete-se a:</text:p>
      <text:list text:style-name="LFO16" text:continue-numbering="true">
        <text:list-item>
          <text:p text:style-name="P102">Utilizar a Plataforma de forma legal</text:p>
        </text:list-item>
        <text:list-item>
          <text:p text:style-name="P103">Não praticar fraude</text:p>
        </text:list-item>
        <text:list-item>
          <text:p text:style-name="P104">Não compartilhar conteúdos fora da Plataforma sem autorização</text:p>
        </text:list-item>
        <text:list-item>
          <text:p text:style-name="P105">Não violar sistemas de segurança</text:p>
        </text:list-item>
      </text:list>
      <text:p text:style-name="Normal">É proibido:</text:p>
      <text:list text:style-name="LFO17" text:continue-numbering="true">
        <text:list-item>
          <text:p text:style-name="P106">Uso de bots</text:p>
        </text:list-item>
        <text:list-item>
          <text:p text:style-name="P107">Engenharia reversa</text:p>
        </text:list-item>
        <text:list-item>
          <text:p text:style-name="P108">Tentativas de invasão</text:p>
        </text:list-item>
      </text:list>
      <text:p text:style-name="Normal"><draw:custom-shape svg:x="0in" svg:y="0in" svg:width="45.51042in" svg:height="0.00139in" draw:z-index="0" draw:id="id19" draw:style-name="a20" draw:name="Horizontal Line 164" text:anchor-type="as-char"><svg:title/><svg:desc/><draw:enhanced-geometry draw:type="non-primitive" svg:viewBox="0 0 21600 21600" draw:enhanced-path="M 0 0 L 21600 0 21600 21600 0 21600 Z N"/></draw:custom-shape></text:p>
      <text:p text:style-name="P109">5. PROPRIEDADE INTELECTUAL</text:p>
      <text:list text:style-name="LFO18" text:continue-numbering="true">
        <text:list-item>
          <text:p text:style-name="P110">O usuário mantém direitos sobre seu conteúdo</text:p>
        </text:list-item>
        <text:list-item>
          <text:p text:style-name="P111">Ao publicar, concede licença de uso à Velvet dentro da Plataforma</text:p>
        </text:list-item>
        <text:list-item>
          <text:p text:style-name="P112">É proibida a reprodução ou distribuição sem autorização</text:p>
        </text:list-item>
      </text:list>
      <text:p text:style-name="Normal"><draw:custom-shape svg:x="0in" svg:y="0in" svg:width="45.51042in" svg:height="0.00139in" draw:z-index="0" draw:id="id20" draw:style-name="a21" draw:name="Horizontal Line 165" text:anchor-type="as-char"><svg:title/><svg:desc/><draw:enhanced-geometry draw:type="non-primitive" svg:viewBox="0 0 21600 21600" draw:enhanced-path="M 0 0 L 21600 0 21600 21600 0 21600 Z N"/></draw:custom-shape></text:p>
      <text:p text:style-name="P113">6. MODERAÇÃO E SANÇÕES</text:p>
      <text:p text:style-name="Normal">A Velvet poderá:</text:p>
      <text:list text:style-name="LFO19" text:continue-numbering="true">
        <text:list-item>
          <text:p text:style-name="P114">Remover conteúdos</text:p>
        </text:list-item>
        <text:list-item>
          <text:p text:style-name="P115">Suspender contas</text:p>
        </text:list-item>
        <text:list-item>
          <text:p text:style-name="P116">Encerrar contas</text:p>
        </text:list-item>
        <text:list-item>
          <text:p text:style-name="P117">Restringir funcionalidades</text:p>
        </text:list-item>
      </text:list>
      <text:soft-page-break/>
      <text:p text:style-name="Normal">Sem aviso prévio, quando necessário.</text:p>
      <text:p text:style-name="Normal"><draw:custom-shape svg:x="0in" svg:y="0in" svg:width="45.51042in" svg:height="0.00139in" draw:z-index="0" draw:id="id21" draw:style-name="a22" draw:name="Horizontal Line 166" text:anchor-type="as-char"><svg:title/><svg:desc/><draw:enhanced-geometry draw:type="non-primitive" svg:viewBox="0 0 21600 21600" draw:enhanced-path="M 0 0 L 21600 0 21600 21600 0 21600 Z N"/></draw:custom-shape></text:p>
      <text:p text:style-name="P118">6.1 Cooperação com Autoridades</text:p>
      <text:p text:style-name="Normal">A Velvet poderá cooperar com autoridades em casos de:</text:p>
      <text:list text:style-name="LFO20" text:continue-numbering="true">
        <text:list-item>
          <text:p text:style-name="P119">Atividades ilegais</text:p>
        </text:list-item>
        <text:list-item>
          <text:p text:style-name="P120">Fraudes</text:p>
        </text:list-item>
        <text:list-item>
          <text:p text:style-name="P121">Crimes digitais</text:p>
        </text:list-item>
      </text:list>
      <text:p text:style-name="Normal"><draw:custom-shape svg:x="0in" svg:y="0in" svg:width="45.51042in" svg:height="0.00139in" draw:z-index="0" draw:id="id22" draw:style-name="a23" draw:name="Horizontal Line 167" text:anchor-type="as-char"><svg:title/><svg:desc/><draw:enhanced-geometry draw:type="non-primitive" svg:viewBox="0 0 21600 21600" draw:enhanced-path="M 0 0 L 21600 0 21600 21600 0 21600 Z N"/></draw:custom-shape></text:p>
      <text:p text:style-name="P122">CONTATO</text:p>
      <text:p text:style-name="Normal"><text:a xlink:href="mailto:contato@velvet.lat" office:target-frame-name="_top" xlink:show="replace"><text:span text:style-name="T123">contato@velvet.lat</text:span></text:a></text:p>
      <text:p text:style-name="Normal"><draw:custom-shape svg:x="0in" svg:y="0in" svg:width="45.51042in" svg:height="0.00139in" draw:z-index="0" draw:id="id23" draw:style-name="a24" draw:name="Horizontal Line 168" text:anchor-type="as-char"><svg:title/><svg:desc/><draw:enhanced-geometry draw:type="non-primitive" svg:viewBox="0 0 21600 21600" draw:enhanced-path="M 0 0 L 21600 0 21600 21600 0 21600 Z N"/></draw:custom-shape></text:p>
      <text:p text:style-name="P124">DISPOSIÇÕES FINAIS</text:p>
      <text:p text:style-name="Normal">Estas Políticas devem ser interpretadas em conjunto com os Termos de Uso e a Política de Privacidad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Hiperligação" style:display-name="Hiperligação" style:family="text" style:parent-style-name="Tipodeletrapredefinidodoparágrafo">
      <style:text-properties fo:color="#467886" style:text-underline-type="single" style:text-underline-style="solid" style:text-underline-width="auto" style:text-underline-mode="continuous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Título1" style:family="paragraph">
      <style:paragraph-properties fo:text-align="center"/>
    </style:style>
    <style:style style:name="T3" style:parent-style-name="Tipodeletrapredefinidodoparágrafo" style:family="text">
      <style:text-properties fo:color="#6F3CFF"/>
    </style:style>
    <style:style style:name="T4" style:parent-style-name="Tipodeletrapredefinidodoparágrafo" style:family="text">
      <style:text-properties fo:color="#6F3CFF"/>
    </style:style>
    <style:style style:family="graphic" style:name="a0" style:parent-style-name="Graphics">
      <style:graphic-properties fo:border="0.01042in none" fo:background-color="transparent" style:wrap="parallel" style:wrap-contour="false" fo:clip="rect(1.84381in, 0in, 1.86742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h text:style-name="P2" text:outline-level="1"><text:span text:style-name="T3"><draw:frame draw:z-index="251659264" draw:style-name="a0" draw:name="Imagem 1" text:anchor-type="paragraph" svg:x="-0.95069in" svg:y="0.00833in" svg:width="2.23958in" svg:height="0.64466in" style:rel-width="scale" style:rel-height="scale"><draw:image xlink:href="media/image1.png" xlink:type="simple" xlink:show="embed" xlink:actuate="onLoad"/><svg:title/><svg:desc/></draw:frame></text:span><text:span text:style-name="T4">POLÍTICAS DE UTILIZAÇÃO</text:span></text:h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dra silva</meta:initial-creator>
    <dc:creator>Sandra silva</dc:creator>
    <meta:creation-date>2026-04-06T19:41:00Z</meta:creation-date>
    <dc:date>2026-04-06T20:19:00Z</dc:date>
    <meta:template xlink:href="Normal" xlink:type="simple"/>
    <meta:editing-cycles>1</meta:editing-cycles>
    <meta:editing-duration>PT2040S</meta:editing-duration>
    <meta:document-statistic meta:page-count="7" meta:paragraph-count="11" meta:word-count="931" meta:character-count="5951" meta:row-count="41" meta:non-whitespace-character-count="5031"/>
  </office:meta>
</office:document-meta>
</file>